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2313ab"/>
    </style:style>
    <style:style style:name="P2" style:family="paragraph" style:parent-style-name="Text_20_body">
      <style:text-properties style:text-underline-style="solid" style:text-underline-width="auto" style:text-underline-color="font-color" officeooo:rsid="002313ab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fo:font-size="12pt" style:text-underline-style="none" officeooo:rsid="002313ab" style:font-size-asian="10.5pt" style:font-size-complex="12pt"/>
    </style:style>
    <style:style style:name="P4" style:family="paragraph" style:parent-style-name="Heading_20_1">
      <style:paragraph-properties fo:margin-top="0cm" fo:margin-bottom="0.247cm" style:contextual-spacing="false" fo:line-height="115%"/>
      <style:text-properties fo:font-size="12pt" style:text-underline-style="none" officeooo:rsid="002313ab" style:font-size-asian="10.5pt" style:font-size-complex="12pt"/>
    </style:style>
    <style:style style:name="P5" style:family="paragraph" style:parent-style-name="Text_20_body">
      <style:text-properties style:text-underline-style="none" officeooo:rsid="002313ab"/>
    </style:style>
    <style:style style:name="P6" style:family="paragraph" style:parent-style-name="Text_20_body" style:list-style-name="L1">
      <style:text-properties style:text-underline-style="none" officeooo:rsid="002313ab"/>
    </style:style>
    <style:style style:name="P7" style:family="paragraph" style:parent-style-name="Text_20_body" style:list-style-name="L2">
      <style:text-properties style:text-underline-style="none" officeooo:rsid="002313ab"/>
    </style:style>
    <style:style style:name="P8" style:family="paragraph" style:parent-style-name="Text_20_body" style:list-style-name="L3">
      <style:text-properties style:text-underline-style="none" officeooo:rsid="002313ab"/>
    </style:style>
    <style:style style:name="P9" style:family="paragraph" style:parent-style-name="Text_20_body" style:list-style-name="L4">
      <style:text-properties style:text-underline-style="none" officeooo:rsid="002313ab"/>
    </style:style>
    <style:style style:name="P10" style:family="paragraph" style:parent-style-name="Text_20_body" style:list-style-name="L5">
      <style:text-properties style:text-underline-style="none" officeooo:rsid="002313ab"/>
    </style:style>
    <style:style style:name="P11" style:family="paragraph" style:parent-style-name="Text_20_body" style:list-style-name="L6">
      <style:text-properties style:text-underline-style="none" officeooo:rsid="002313ab"/>
    </style:style>
    <style:style style:name="P12" style:family="paragraph" style:parent-style-name="Text_20_body" style:list-style-name="L7">
      <style:text-properties style:text-underline-style="none" officeooo:rsid="002313ab"/>
    </style:style>
    <style:style style:name="P13" style:family="paragraph" style:parent-style-name="Text_20_body" style:list-style-name="L8">
      <style:text-properties style:text-underline-style="none" officeooo:rsid="002313ab"/>
    </style:style>
    <style:style style:name="P14" style:family="paragraph" style:parent-style-name="Text_20_body" style:list-style-name="L9">
      <style:text-properties style:text-underline-style="none" officeooo:rsid="002313ab"/>
    </style:style>
    <style:style style:name="P15" style:family="paragraph" style:parent-style-name="Text_20_body" style:list-style-name="L10">
      <style:text-properties style:text-underline-style="none" officeooo:rsid="002313ab"/>
    </style:style>
    <style:style style:name="P16" style:family="paragraph" style:parent-style-name="Text_20_body" style:list-style-name="L11">
      <style:text-properties style:text-underline-style="none" officeooo:rsid="002313ab"/>
    </style:style>
    <style:style style:name="P17" style:family="paragraph" style:parent-style-name="Text_20_body" style:list-style-name="L12">
      <style:text-properties style:text-underline-style="solid" style:text-underline-width="auto" style:text-underline-color="font-color" officeooo:rsid="002313ab"/>
    </style:style>
    <style:style style:name="P18" style:family="paragraph" style:parent-style-name="Text_20_body" style:list-style-name="L13">
      <style:text-properties style:text-underline-style="none" officeooo:rsid="002313ab"/>
    </style:style>
    <style:style style:name="P19" style:family="paragraph" style:parent-style-name="Text_20_body">
      <style:text-properties officeooo:paragraph-rsid="002313ab"/>
    </style:style>
    <style:style style:name="T1" style:family="text">
      <style:text-properties fo:font-size="12pt" style:text-underline-style="none" officeooo:rsid="002313ab" style:font-size-asian="10.5pt" style:font-size-complex="12pt"/>
    </style:style>
    <style:style style:name="T2" style:family="text">
      <style:text-properties officeooo:rsid="00251300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mphasis"><text:span text:style-name="T1">TERMOS DE SERVIÇO – THE GODS STUDIO</text:span></text:span></text:h>
      <text:p text:style-name="P2"><text:span text:style-name="Strong_20_Emphasis">Última atualização:</text:span> 26/06/2026<text:span text:style-name="T2"> - 08:02</text:span></text:p>
      <text:p text:style-name="P3"/>
      <text:h text:style-name="P4" text:outline-level="1">1. Quem somos</text:h>
      <text:p text:style-name="P2"><text:span text:style-name="T3">O </text:span><text:span text:style-name="Strong_20_Emphasis"><text:span text:style-name="T3">The Gods Studio</text:span></text:span><text:span text:style-name="T3"> é um coletivo informal de jovens aprendizes, com idades entre 14 e 17 anos, que atua no desenvolvimento de sites, sistemas, automações, design gráfico, identidade visual, edição de imagens e demais serviços digitais.</text:span></text:p>
      <text:p text:style-name="P5">Nosso objetivo é adquirir experiência prática, desenvolver projetos reais e prestar serviços com dedicação, transparência e boa-fé.</text:p>
      <text:p text:style-name="P2"><text:span text:style-name="T3">Atualmente, o The Gods Studio </text:span><text:span text:style-name="Strong_20_Emphasis"><text:span text:style-name="T3">não é uma empresa formalmente registrada</text:span></text:span><text:span text:style-name="T3"> e atua como um grupo de colaboradores independentes, sob acompanhamento e autorização de seus responsáveis legais.</text:span></text:p>
      <text:p text:style-name="P3"/>
      <text:h text:style-name="P4" text:outline-level="1">2. Supervisão dos responsáveis</text:h>
      <text:p text:style-name="P5">Todos os integrantes do The Gods Studio exercem suas atividades com autorização expressa de seus pais ou responsáveis legais.</text:p>
      <text:p text:style-name="P5">Ao contratar nossos serviços, o cliente declara estar ciente de que:</text:p>
      <text:list text:style-name="L1">
        <text:list-item>
          <text:p text:style-name="P6">os integrantes são menores de idade em processo de aprendizado;</text:p>
        </text:list-item>
        <text:list-item>
          <text:p text:style-name="P6">existe acompanhamento dos responsáveis legais quando necessário;</text:p>
        </text:list-item>
        <text:list-item>
          <text:p text:style-name="P6">a atividade possui caráter educativo e de desenvolvimento profissional;</text:p>
        </text:list-item>
        <text:list-item>
          <text:p text:style-name="P6">não existe vínculo empregatício entre o cliente e qualquer integrante do The Gods Studio.</text:p>
        </text:list-item>
      </text:list>
      <text:p text:style-name="P3"/>
      <text:h text:style-name="P4" text:outline-level="1">3. Serviços prestados</text:h>
      <text:p text:style-name="P5">Entre os serviços que podem ser oferecidos estão:</text:p>
      <text:list text:style-name="L2">
        <text:list-item>
          <text:p text:style-name="P7">criação de sites;</text:p>
        </text:list-item>
        <text:list-item>
          <text:p text:style-name="P7">desenvolvimento de sistemas;</text:p>
        </text:list-item>
        <text:list-item>
          <text:p text:style-name="P7">bots e automações;</text:p>
        </text:list-item>
        <text:list-item>
          <text:p text:style-name="P7">design gráfico;</text:p>
        </text:list-item>
        <text:list-item>
          <text:p text:style-name="P7">identidade visual;</text:p>
        </text:list-item>
        <text:list-item>
          <text:p text:style-name="P7">edição de imagens;</text:p>
        </text:list-item>
        <text:list-item>
          <text:p text:style-name="P7">landing pages;</text:p>
        </text:list-item>
        <text:list-item>
          <text:p text:style-name="P7">manutenção de projetos;</text:p>
        </text:list-item>
        <text:list-item>
          <text:p text:style-name="P7">outros serviços digitais previamente acordados.</text:p>
        </text:list-item>
      </text:list>
      <text:p text:style-name="P5"><text:soft-page-break/>Todo projeto será definido por orçamento e descrição do escopo antes do início dos trabalhos.</text:p>
      <text:p text:style-name="P3"/>
      <text:h text:style-name="P4" text:outline-level="1">4. Orçamento</text:h>
      <text:p text:style-name="P5">Cada projeto possui orçamento próprio.</text:p>
      <text:p text:style-name="P5">Antes do início dos serviços serão definidos:</text:p>
      <text:list text:style-name="L3">
        <text:list-item>
          <text:p text:style-name="P8">escopo do projeto;</text:p>
        </text:list-item>
        <text:list-item>
          <text:p text:style-name="P8">valor total;</text:p>
        </text:list-item>
        <text:list-item>
          <text:p text:style-name="P8">forma de pagamento;</text:p>
        </text:list-item>
        <text:list-item>
          <text:p text:style-name="P8">prazo estimado;</text:p>
        </text:list-item>
        <text:list-item>
          <text:p text:style-name="P8">entregáveis.</text:p>
        </text:list-item>
      </text:list>
      <text:p text:style-name="P5">Qualquer alteração significativa solicitada posteriormente poderá gerar novo orçamento.</text:p>
      <text:p text:style-name="P3"/>
      <text:h text:style-name="P4" text:outline-level="1">5. Pagamento</text:h>
      <text:p text:style-name="P5">Os pagamentos poderão ocorrer por PIX ou outro meio previamente combinado.</text:p>
      <text:p text:style-name="P5">Para determinados projetos poderá ser solicitado um pagamento inicial ("sinal") para início dos trabalhos.</text:p>
      <text:p text:style-name="P5">O restante poderá ser pago conforme acordado entre as partes.</text:p>
      <text:p text:style-name="P3"/>
      <text:h text:style-name="P4" text:outline-level="1">6. Prazos</text:h>
      <text:p text:style-name="P5">Os prazos informados possuem natureza estimativa.</text:p>
      <text:p text:style-name="P5">Embora o The Gods Studio trabalhe para cumprir as datas combinadas, poderão ocorrer ajustes decorrentes de:</text:p>
      <text:list text:style-name="L4">
        <text:list-item>
          <text:p text:style-name="P9">revisões solicitadas;</text:p>
        </text:list-item>
        <text:list-item>
          <text:p text:style-name="P9">alterações no escopo;</text:p>
        </text:list-item>
        <text:list-item>
          <text:p text:style-name="P9">problemas técnicos;</text:p>
        </text:list-item>
        <text:list-item>
          <text:p text:style-name="P9">indisponibilidade de serviços de terceiros;</text:p>
        </text:list-item>
        <text:list-item>
          <text:p text:style-name="P9">imprevistos pessoais;</text:p>
        </text:list-item>
        <text:list-item>
          <text:p text:style-name="P9">força maior.</text:p>
        </text:list-item>
      </text:list>
      <text:p text:style-name="P5">Caso seja necessário alterar o prazo inicialmente previsto, o cliente será comunicado tão logo seja possível.</text:p>
      <text:p text:style-name="P3"/>
      <text:h text:style-name="P4" text:outline-level="1">7. Obrigações do cliente</text:h>
      <text:p text:style-name="P5">O cliente compromete-se a:</text:p>
      <text:list text:style-name="L5">
        <text:list-item>
          <text:p text:style-name="P10"><text:soft-page-break/>fornecer informações verdadeiras;</text:p>
        </text:list-item>
        <text:list-item>
          <text:p text:style-name="P10">responder às solicitações necessárias para o desenvolvimento do projeto;</text:p>
        </text:list-item>
        <text:list-item>
          <text:p text:style-name="P10">encaminhar materiais (logos, textos, imagens, documentos etc.) quando solicitado;</text:p>
        </text:list-item>
        <text:list-item>
          <text:p text:style-name="P10">respeitar os prazos de aprovação.</text:p>
        </text:list-item>
      </text:list>
      <text:p text:style-name="P5">A demora no envio das informações poderá resultar na prorrogação do prazo de entrega.</text:p>
      <text:p text:style-name="P3"/>
      <text:h text:style-name="P4" text:outline-level="1">8. Cancelamento</text:h>
      <text:p text:style-name="P5">O cliente poderá solicitar o cancelamento antes da conclusão do projeto.</text:p>
      <text:p text:style-name="P5">Caso o cancelamento ocorra antes da entrega final, o The Gods Studio realizará o reembolso integral dos valores pagos.</text:p>
      <text:p text:style-name="P5">Se o projeto já tiver sido entregue e aprovado pelo cliente, não haverá reembolso, salvo acordo entre as partes ou quando exigido pela legislação aplicável.</text:p>
      <text:p text:style-name="P5">Caso o próprio The Gods Studio decida interromper definitivamente o projeto antes da entrega, todos os valores pagos serão devolvidos integralmente.</text:p>
      <text:p text:style-name="P3"/>
      <text:h text:style-name="P4" text:outline-level="1">9. Suspensão por abandono</text:h>
      <text:p text:style-name="P5">Caso o cliente permaneça sem responder às solicitações relacionadas ao projeto por período superior a 30 (trinta) dias consecutivos, o projeto poderá ser considerado suspenso.</text:p>
      <text:p text:style-name="P5">Quando houver retomada, novos prazos poderão ser definidos conforme a disponibilidade da equipe.</text:p>
      <text:p text:style-name="P3"/>
      <text:h text:style-name="P4" text:outline-level="1">10. Conduta</text:h>
      <text:p text:style-name="P5">Esperamos que toda comunicação ocorra com respeito.</text:p>
      <text:p text:style-name="P5">Não serão aceitos:</text:p>
      <text:list text:style-name="L6">
        <text:list-item>
          <text:p text:style-name="P11">ofensas;</text:p>
        </text:list-item>
        <text:list-item>
          <text:p text:style-name="P11">ameaças;</text:p>
        </text:list-item>
        <text:list-item>
          <text:p text:style-name="P11">discriminação;</text:p>
        </text:list-item>
        <text:list-item>
          <text:p text:style-name="P11">assédio;</text:p>
        </text:list-item>
        <text:list-item>
          <text:p text:style-name="P11">comportamento abusivo.</text:p>
        </text:list-item>
      </text:list>
      <text:p text:style-name="P5">Ocorrendo qualquer dessas situações, o The Gods Studio poderá encerrar imediatamente o atendimento.</text:p>
      <text:p text:style-name="P5">Nessa hipótese, poderá ser realizado o reembolso integral dos valores pagos, conforme avaliação do caso.</text:p>
      <text:p text:style-name="P3"/>
      <text:h text:style-name="P4" text:outline-level="1"><text:soft-page-break/>11. Hospedagem, domínios e serviços de terceiros</text:h>
      <text:p text:style-name="P2"><text:span text:style-name="T3">Salvo disposição expressa em contrário no orçamento, </text:span><text:span text:style-name="Strong_20_Emphasis"><text:span text:style-name="T3">não estão incluídos</text:span></text:span><text:span text:style-name="T3">:</text:span></text:p>
      <text:list text:style-name="L7">
        <text:list-item>
          <text:p text:style-name="P12">hospedagem;</text:p>
        </text:list-item>
        <text:list-item>
          <text:p text:style-name="P12">registro de domínio;</text:p>
        </text:list-item>
        <text:list-item>
          <text:p text:style-name="P12">servidores;</text:p>
        </text:list-item>
        <text:list-item>
          <text:p text:style-name="P12">APIs pagas;</text:p>
        </text:list-item>
        <text:list-item>
          <text:p text:style-name="P12">licenças de software;</text:p>
        </text:list-item>
        <text:list-item>
          <text:p text:style-name="P12">serviços de terceiros;</text:p>
        </text:list-item>
        <text:list-item>
          <text:p text:style-name="P12">mensalidades.</text:p>
        </text:list-item>
      </text:list>
      <text:p text:style-name="P5">Esses custos são de responsabilidade do cliente.</text:p>
      <text:p text:style-name="P3"/>
      <text:h text:style-name="P4" text:outline-level="1">12. Entrega e revisões</text:h>
      <text:p text:style-name="P5">O projeto será entregue conforme o escopo inicialmente aprovado.</text:p>
      <text:p text:style-name="P5">O cliente poderá solicitar ajustes compatíveis com o escopo contratado.</text:p>
      <text:p text:style-name="P5">Alterações que representem novas funcionalidades, mudanças estruturais ou expansão do projeto poderão gerar novo orçamento.</text:p>
      <text:p text:style-name="P3"/>
      <text:h text:style-name="P4" text:outline-level="1">13. Propriedade intelectual</text:h>
      <text:p text:style-name="P5">Após a quitação integral dos valores contratados, o cliente passa a possuir os direitos de uso do material desenvolvido especificamente para seu projeto.</text:p>
      <text:p text:style-name="P5">O The Gods Studio poderá divulgar o projeto em seu portfólio, redes sociais ou apresentações institucionais, salvo quando houver solicitação expressa de confidencialidade feita pelo cliente antes da publicação.</text:p>
      <text:p text:style-name="P3"/>
      <text:h text:style-name="P4" text:outline-level="1">14. Proteção de dados (LGPD)</text:h>
      <text:p text:style-name="P5">Os dados fornecidos pelo cliente serão utilizados exclusivamente para:</text:p>
      <text:list text:style-name="L8">
        <text:list-item>
          <text:p text:style-name="P13">comunicação;</text:p>
        </text:list-item>
        <text:list-item>
          <text:p text:style-name="P13">elaboração do projeto;</text:p>
        </text:list-item>
        <text:list-item>
          <text:p text:style-name="P13">emissão de documentos relacionados ao serviço;</text:p>
        </text:list-item>
        <text:list-item>
          <text:p text:style-name="P13">cumprimento de obrigações legais.</text:p>
        </text:list-item>
      </text:list>
      <text:p text:style-name="P5">Os dados não serão comercializados.</text:p>
      <text:p text:style-name="P5">Quando necessário, poderão ser compartilhados apenas com plataformas indispensáveis para a execução do serviço (como hospedagem, registro de domínio ou envio de e-mails).</text:p>
      <text:p text:style-name="P5"><text:soft-page-break/>O cliente poderá solicitar atualização, correção ou exclusão de seus dados, observadas as hipóteses legais de retenção.</text:p>
      <text:p text:style-name="P3"/>
      <text:h text:style-name="P4" text:outline-level="1">15. Limitação de responsabilidade</text:h>
      <text:p text:style-name="P5">O The Gods Studio compromete-se a executar seus serviços com boa-fé, diligência e dedicação.</text:p>
      <text:p text:style-name="P5">Entretanto, não garante resultados comerciais específicos, incluindo, entre outros:</text:p>
      <text:list text:style-name="L9">
        <text:list-item>
          <text:p text:style-name="P14">aumento de vendas;</text:p>
        </text:list-item>
        <text:list-item>
          <text:p text:style-name="P14">crescimento de seguidores;</text:p>
        </text:list-item>
        <text:list-item>
          <text:p text:style-name="P14">posicionamento em mecanismos de busca;</text:p>
        </text:list-item>
        <text:list-item>
          <text:p text:style-name="P14">geração de lucro;</text:p>
        </text:list-item>
        <text:list-item>
          <text:p text:style-name="P14">aumento de tráfego.</text:p>
        </text:list-item>
      </text:list>
      <text:p text:style-name="P5">Também não será responsável por danos decorrentes de:</text:p>
      <text:list text:style-name="L10">
        <text:list-item>
          <text:p text:style-name="P15">falhas em serviços de terceiros;</text:p>
        </text:list-item>
        <text:list-item>
          <text:p text:style-name="P15">indisponibilidade de hospedagem;</text:p>
        </text:list-item>
        <text:list-item>
          <text:p text:style-name="P15">interrupções na internet;</text:p>
        </text:list-item>
        <text:list-item>
          <text:p text:style-name="P15">ataques virtuais;</text:p>
        </text:list-item>
        <text:list-item>
          <text:p text:style-name="P15">exclusão de dados por terceiros;</text:p>
        </text:list-item>
        <text:list-item>
          <text:p text:style-name="P15">problemas decorrentes de alterações realizadas pelo próprio cliente após a entrega.</text:p>
        </text:list-item>
      </text:list>
      <text:p text:style-name="P5">Na máxima extensão permitida pela legislação brasileira, eventual responsabilidade civil do The Gods Studio ficará limitada ao valor efetivamente pago pelo cliente pelo serviço contratado, ressalvadas as hipóteses em que a legislação determine responsabilidade diversa, especialmente em casos de dolo ou culpa grave.</text:p>
      <text:p text:style-name="P3"/>
      <text:h text:style-name="P4" text:outline-level="1">16. Caso fortuito e força maior</text:h>
      <text:p text:style-name="P5">O The Gods Studio não responderá por atrasos ou impossibilidade temporária de execução dos serviços decorrentes de eventos imprevisíveis ou inevitáveis, incluindo, mas não se limitando a:</text:p>
      <text:list text:style-name="L11">
        <text:list-item>
          <text:p text:style-name="P16">falhas de energia;</text:p>
        </text:list-item>
        <text:list-item>
          <text:p text:style-name="P16">problemas de internet;</text:p>
        </text:list-item>
        <text:list-item>
          <text:p text:style-name="P16">indisponibilidade de plataformas de terceiros;</text:p>
        </text:list-item>
        <text:list-item>
          <text:p text:style-name="P16">doenças;</text:p>
        </text:list-item>
        <text:list-item>
          <text:p text:style-name="P16">acidentes;</text:p>
        </text:list-item>
        <text:list-item>
          <text:p text:style-name="P16">eventos climáticos;</text:p>
        </text:list-item>
        <text:list-item>
          <text:p text:style-name="P16">situações de força maior.</text:p>
        </text:list-item>
      </text:list>
      <text:p text:style-name="P5"><text:soft-page-break/>Sempre que possível, o cliente será informado sobre tais ocorrências.</text:p>
      <text:p text:style-name="P3"/>
      <text:h text:style-name="P4" text:outline-level="1">17. Nota fiscal</text:h>
      <text:p text:style-name="P5">Neste momento, o The Gods Studio não emite nota fiscal por não possuir constituição empresarial formal.</text:p>
      <text:p text:style-name="P5">Caso essa condição seja alterada futuramente, este termo poderá ser atualizado.</text:p>
      <text:p text:style-name="P3"/>
      <text:h text:style-name="P4" text:outline-level="1">18. Alterações destes Termos</text:h>
      <text:p text:style-name="P5">O The Gods Studio poderá atualizar estes Termos de Serviço sempre que necessário.</text:p>
      <text:p text:style-name="P5">As alterações não afetarão contratos já aceitos, salvo quando houver concordância expressa entre as partes.</text:p>
      <text:p text:style-name="P3"/>
      <text:h text:style-name="P4" text:outline-level="1">19. Aceitação</text:h>
      <text:p text:style-name="P5">Antes do início do projeto e de qualquer pagamento, o cliente deverá manifestar seu aceite de forma expressa.</text:p>
      <text:p text:style-name="P5">O aceite poderá ocorrer mediante uma das seguintes formas:</text:p>
      <text:list text:style-name="L12">
        <text:list-item>
          <text:p text:style-name="P17"><text:span text:style-name="T3">envio da mensagem </text:span><text:span text:style-name="Strong_20_Emphasis"><text:span text:style-name="T3">"Li e aceito os Termos de Serviço do The Gods Studio"</text:span></text:span><text:span text:style-name="T3">;</text:span></text:p>
        </text:list-item>
        <text:list-item>
          <text:p text:style-name="P17"><text:span text:style-name="T3">resposta </text:span><text:span text:style-name="Strong_20_Emphasis"><text:span text:style-name="T3">"OK"</text:span></text:span><text:span text:style-name="T3">, </text:span><text:span text:style-name="Strong_20_Emphasis"><text:span text:style-name="T3">"Aceito"</text:span></text:span><text:span text:style-name="T3"> ou </text:span><text:span text:style-name="Strong_20_Emphasis"><text:span text:style-name="T3">"Estou de acordo"</text:span></text:span><text:span text:style-name="T3">, quando solicitado pelo The Gods Studio.</text:span></text:p>
        </text:list-item>
      </text:list>
      <text:p text:style-name="P5">Ao manifestar seu aceite, o cliente declara que:</text:p>
      <text:list text:style-name="L13">
        <text:list-item>
          <text:p text:style-name="P18">leu integralmente estes Termos;</text:p>
        </text:list-item>
        <text:list-item>
          <text:p text:style-name="P18">compreendeu seu conteúdo;</text:p>
        </text:list-item>
        <text:list-item>
          <text:p text:style-name="P18">concorda voluntariamente com todas as cláusulas;</text:p>
        </text:list-item>
        <text:list-item>
          <text:p text:style-name="P18">reconhece que contratou um coletivo informal de jovens aprendizes, supervisionado por responsáveis legais;</text:p>
        </text:list-item>
        <text:list-item>
          <text:p text:style-name="P18">concorda com os prazos, limitações e condições aqui estabelecidas.</text:p>
        </text:list-item>
      </text:list>
      <text:p text:style-name="P3"/>
      <text:h text:style-name="P4" text:outline-level="1">20. Legislação aplicável</text:h>
      <text:p text:style-name="P5">Este documento será interpretado de acordo com a legislação da República Federativa do Brasil.</text:p>
      <text:p text:style-name="P5">Caso qualquer cláusula seja considerada inválida ou inexequível por decisão judicial, as demais disposições permanecerão válidas e em pleno vigor.</text:p>
      <text:p text:style-name="P3"/>
      <text:p text:style-name="P2"><text:span text:style-name="Strong_20_Emphasis"><text:span text:style-name="T3">THE GODS STUDIO</text:span></text:span></text:p>
      <text:p text:style-name="P2"><text:span text:style-name="T3">Ao responder </text:span><text:span text:style-name="Strong_20_Emphasis"><text:span text:style-name="T3">"Li e aceito"</text:span></text:span><text:span text:style-name="T3">, </text:span><text:span text:style-name="Strong_20_Emphasis"><text:span text:style-name="T3">"Aceito"</text:span></text:span><text:span text:style-name="T3">, </text:span><text:span text:style-name="Strong_20_Emphasis"><text:span text:style-name="T3">"OK"</text:span></text:span><text:span text:style-name="T3"> ou </text:span><text:span text:style-name="Strong_20_Emphasis"><text:span text:style-name="T3">"Estou de acordo"</text:span></text:span><text:span text:style-name="T3">, o cliente confirma que leu este documento, compreendeu seu conteúdo e concorda com todas as suas condições.</text:span></text:p>
      <text:p text:style-name="P19"><text:soft-page-break/><text:span text:style-name="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17:25:28.123515443</meta:creation-date>
    <dc:date>2026-06-26T08:02:01.695609909</dc:date>
    <meta:editing-duration>PT13M46S</meta:editing-duration>
    <meta:editing-cycles>5</meta:editing-cycles>
    <meta:generator>LibreOffice/26.2.4.2$Linux_X86_64 LibreOffice_project/0229ac93fcf0d7cbc6376066c6f35021cef002dc</meta:generator>
    <meta:document-statistic meta:table-count="0" meta:image-count="0" meta:object-count="0" meta:page-count="7" meta:paragraph-count="147" meta:word-count="1250" meta:character-count="8359" meta:non-whitespace-character-count="7324"/>
  </office:meta>
</office:document-meta>
</file>